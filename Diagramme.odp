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006cm" fo:min-width="6.256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5.462cm" loext:decorative="false"/>
      <style:paragraph-properties style:writing-mode="lr-tb"/>
    </style:style>
    <style:style style:name="gr4" style:family="graphic" style:parent-style-name="standard">
      <style:graphic-properties draw:fill="solid" draw:fill-color="#ff6d6d"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3faf46"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8d1d75" draw:textarea-horizontal-align="justify" draw:textarea-vertical-align="middle" draw:auto-grow-height="false" fo:min-height="0.75cm" fo:min-width="3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6d6d" draw:textarea-horizontal-align="left" draw:textarea-vertical-align="middle" draw:auto-grow-height="false" fo:min-height="1.75cm" fo:min-width="6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5983b0" draw:textarea-horizontal-align="justify" draw:textarea-vertical-align="middle" draw:auto-grow-height="false" fo:min-height="0.75cm" fo:min-width="3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8cm" loext:decorative="false"/>
      <style:paragraph-properties style:writing-mode="lr-tb"/>
    </style:style>
    <style:style style:name="gr12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09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04cm" fo:min-width="0cm" loext:decorative="false"/>
    </style:style>
    <style:style style:name="gr15" style:family="graphic">
      <style:graphic-properties style:protect="siz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556cm" fo:min-width="2.806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.462cm" loext:decorative="false"/>
      <style:paragraph-properties style:writing-mode="lr-tb"/>
    </style:style>
    <style:style style:name="gr18" style:family="graphic" style:parent-style-name="standard">
      <style:graphic-properties draw:fill="solid" draw:fill-color="#3faf46"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ff6d6d" draw:textarea-horizontal-align="center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.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1.5cm" loext:decorative="false"/>
      <style:paragraph-properties style:writing-mode="lr-tb"/>
    </style:style>
    <style:style style:name="gr25" style:family="graphic" style:parent-style-name="objectwithoutfill">
      <style:graphic-properties draw:fill="none" draw:textarea-vertical-align="middle" loext:decorative="false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6d6d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3faf46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000000" loext:opacity="100%"/>
    </style:style>
    <style:style style:name="P7" style:family="paragraph">
      <loext:graphic-properties draw:fill="solid" draw:fill-color="#8d1d75"/>
      <style:paragraph-properties fo:text-align="center" style:writing-mode="lr-tb"/>
      <style:text-properties fo:color="#000000" loext:opacity="100%"/>
    </style:style>
    <style:style style:name="P8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ff6d6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5983b0"/>
      <style:paragraph-properties fo:text-align="center" style:writing-mode="lr-tb"/>
    </style:style>
    <style:style style:name="P11" style:family="paragraph">
      <loext:graphic-properties draw:fill="none" draw:fill-color="#ffffff"/>
      <style:text-properties fo:color="#8d1d75" loext:opacity="100%"/>
    </style:style>
    <style:style style:name="P12" style:family="paragraph">
      <loext:graphic-properties draw:fill="none" draw:fill-color="#ffffff"/>
      <style:text-properties fo:color="#2a6099" loext:opacity="100%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3faf46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2a6099" loext:opacity="100%" fo:font-weight="bold" style:font-weight-asian="bold" style:font-weight-complex="bold"/>
    </style:style>
    <style:style style:name="P2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>
      <loext:graphic-properties draw:fill="solid" draw:fill-color="#ff6d6d"/>
      <style:paragraph-properties fo:text-align="center"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8d1d75" loext:opacity="100%"/>
    </style:style>
    <style:style style:name="T6" style:family="text">
      <style:text-properties fo:color="#2a6099" loext:opacity="100%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a6099" loext:opacity="100%" fo:font-weight="bold" style:font-weight-asian="bold" style:font-weight-complex="bold"/>
    </style:style>
    <style:style style:name="T9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0.5cm" svg:y1="3cm" svg:x2="10.5cm" svg:y2="6.5cm">
          <text:p/>
        </draw:line>
        <draw:custom-shape draw:style-name="gr2" draw:text-style-name="P1" draw:layer="layout" svg:width="7cm" svg:height="2.5cm" svg:x="7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2" draw:layer="layout" svg:width="5.962cm" svg:height="2.621cm" svg:x="8.038cm" svg:y="0.5cm">
          <draw:text-box>
            <text:p><text:span text:style-name="T1">INIT :</text:span></text:p>
            <text:p><text:span text:style-name="T2">BP1 pour allumer</text:span></text:p>
            <text:p><text:span text:style-name="T2">BP2 pour éteindre</text:span></text:p>
            <text:p><text:span text:style-name="T2">Led verte pour l’état du relais</text:span></text:p>
            <text:p><text:span text:style-name="T2">Relais 1 Pompe</text:span></text:p>
          </draw:text-box>
        </draw:frame>
        <draw:custom-shape draw:style-name="gr4" draw:text-style-name="P4" xml:id="id7" draw:id="id7" draw:layer="layout" svg:width="4.5cm" svg:height="2.5cm" svg:x="5cm" svg:y="12cm">
          <text:p text:style-name="P3"><text:span text:style-name="T1">ETAT ETEINT :</text:span></text:p>
          <text:p text:style-name="P3"><text:span text:style-name="T3">Pompe éteinte</text:span></text:p>
          <text:p text:style-name="P3"><text:span text:style-name="T3">LED éteint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4.5cm" svg:height="2.5cm" svg:x="12.5cm" svg:y="12cm">
          <text:p text:style-name="P3"><text:span text:style-name="T1">ETAT ALLUME :</text:span></text:p>
          <text:p text:style-name="P3"><text:span text:style-name="T3">Pompe allumée</text:span></text:p>
          <text:p text:style-name="P3"><text:span text:style-name="T3">LED allumé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7cm" svg:height="2cm" svg:x="7cm" svg:y="6.5cm">
          <text:p text:style-name="P6"><text:span text:style-name="T4">Test de l’état coura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9" draw:layer="layout" svg:width="6.5cm" svg:height="2cm" svg:x="7.5cm" svg:y="3.5cm">
          <text:p text:style-name="P8"><text:span text:style-name="T1">ETAT INITIAL « ETEINT »:</text:span></text:p>
          <text:p text:style-name="P8"><text:span text:style-name="T3">Pompe éteinte</text:span></text:p>
          <text:p text:style-name="P8"><text:span text:style-name="T3">LED éteint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3" draw:id="id3" draw:layer="layout" svg:width="7cm" svg:height="2cm" svg:x="3.5cm" svg:y="9cm">
          <text:p text:style-name="P1">Test de BP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2" draw:id="id2" draw:layer="layout" svg:width="7cm" svg:height="2cm" svg:x="11cm" svg:y="9cm">
          <text:p text:style-name="P1">Test de BP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4cm" svg:y1="7.5cm" svg:x2="14.5cm" svg:y2="9cm" draw:start-shape="id1" draw:start-glue-point="7" draw:end-shape="id2" draw:end-glue-point="4" svg:d="M14000 7500h500v1500" svg:viewBox="0 0 501 1501">
          <text:p/>
        </draw:connector>
        <draw:connector draw:style-name="gr1" draw:text-style-name="P1" xml:id="id4" draw:id="id4" draw:layer="layout" svg:x1="7cm" svg:y1="7.5cm" svg:x2="7cm" svg:y2="7.5cm" draw:start-shape="id1" draw:start-glue-point="5" draw:end-shape="id1" draw:end-glue-point="5" svg:d="M7000 7500z" svg:viewBox="0 0 1 1">
          <text:p/>
        </draw:connector>
        <draw:connector draw:style-name="gr1" draw:text-style-name="P1" draw:layer="layout" svg:x1="7cm" svg:y1="9cm" svg:x2="7cm" svg:y2="7.5cm" draw:start-shape="id3" draw:start-glue-point="4" draw:end-shape="id4" draw:end-glue-point="0" svg:d="M7000 9000v-1500" svg:viewBox="0 0 1 1501">
          <text:p/>
        </draw:connector>
        <draw:frame draw:style-name="gr9" draw:text-style-name="P11" draw:layer="layout" svg:width="3.185cm" svg:height="0.962cm" svg:x="12.815cm" svg:y="8cm">
          <draw:text-box>
            <text:p><text:span text:style-name="T5">« Eteint »</text:span></text:p>
          </draw:text-box>
        </draw:frame>
        <draw:frame draw:style-name="gr10" draw:text-style-name="P11" draw:layer="layout" svg:width="3.326cm" svg:height="0.962cm" svg:x="5.674cm" svg:y="8.038cm">
          <draw:text-box>
            <text:p><text:span text:style-name="T5">« Allumé»</text:span></text:p>
          </draw:text-box>
        </draw:frame>
        <draw:frame draw:style-name="gr11" draw:text-style-name="P12" draw:layer="layout" svg:width="3.538cm" svg:height="0.962cm" svg:x="14.962cm" svg:y="11cm">
          <draw:text-box>
            <text:p><text:span text:style-name="T6">« Appuyé»</text:span></text:p>
          </draw:text-box>
        </draw:frame>
        <draw:line draw:style-name="gr1" draw:text-style-name="P1" draw:layer="layout" svg:x1="14.5cm" svg:y1="11.249cm" svg:x2="14.5cm" svg:y2="12cm">
          <text:p/>
        </draw:line>
        <draw:frame draw:style-name="gr11" draw:text-style-name="P12" draw:layer="layout" svg:width="3.538cm" svg:height="0.962cm" svg:x="7.5cm" svg:y="11.038cm">
          <draw:text-box>
            <text:p><text:span text:style-name="T6">« Appuyé»</text:span></text:p>
          </draw:text-box>
        </draw:frame>
        <draw:line draw:style-name="gr1" draw:text-style-name="P1" draw:layer="layout" svg:x1="7cm" svg:y1="11.249cm" svg:x2="7cm" svg:y2="12cm">
          <text:p/>
        </draw:line>
        <draw:connector draw:style-name="gr12" draw:text-style-name="P13" draw:layer="layout" svg:x1="3.5cm" svg:y1="10cm" svg:x2="10.192cm" svg:y2="6.143cm" draw:start-shape="id3" draw:start-glue-point="5" svg:d="M3500 10000h-501v-3857h7193" svg:viewBox="0 0 7194 3858">
          <text:p/>
        </draw:connector>
        <draw:connector draw:style-name="gr12" draw:text-style-name="P13" draw:layer="layout" svg:x1="18cm" svg:y1="10cm" svg:x2="10.619cm" svg:y2="6.07cm" draw:start-shape="id2" draw:start-glue-point="7" draw:end-shape="id5" draw:end-glue-point="9" svg:d="M18000 10000h502v-3930h-7883" svg:viewBox="0 0 7884 3931">
          <text:p/>
        </draw:connector>
        <draw:frame draw:style-name="gr13" draw:text-style-name="P12" draw:layer="layout" svg:width="3.009cm" svg:height="1.673cm" svg:x="0.5cm" svg:y="9cm">
          <draw:text-box>
            <text:p><text:span text:style-name="T6">« Non</text:span></text:p>
            <text:p><text:span text:style-name="T6">Appuyé»</text:span></text:p>
          </draw:text-box>
        </draw:frame>
        <draw:frame draw:style-name="gr13" draw:text-style-name="P12" draw:layer="layout" svg:width="3.009cm" svg:height="1.673cm" svg:x="18.5cm" svg:y="8.827cm">
          <draw:text-box>
            <text:p><text:span text:style-name="T6">« Non</text:span></text:p>
            <text:p><text:span text:style-name="T6">Appuyé»</text:span></text:p>
          </draw:text-box>
        </draw:frame>
        <draw:connector draw:style-name="gr12" draw:text-style-name="P13" draw:layer="layout" draw:line-skew="0cm 11.403cm" svg:x1="14.75cm" svg:y1="14.5cm" svg:x2="10.692cm" svg:y2="5.893cm" draw:start-shape="id6" draw:start-glue-point="2" draw:end-shape="id5" draw:end-glue-point="10" svg:d="M14750 14500v501h8250v-9108h-12308" svg:viewBox="0 0 12309 9109">
          <text:p/>
        </draw:connector>
        <draw:connector draw:style-name="gr12" draw:text-style-name="P13" draw:layer="layout" draw:line-skew="0cm -3.999cm" svg:x1="7.25cm" svg:y1="14.5cm" svg:x2="10.192cm" svg:y2="5.893cm" draw:start-shape="id7" draw:start-glue-point="2" draw:end-shape="id5" draw:end-glue-point="6" svg:d="M7250 14500v501h-6750v-9108h9692" svg:viewBox="0 0 9693 9109">
          <text:p/>
        </draw:connector>
        <draw:custom-shape draw:style-name="gr14" draw:text-style-name="P1" xml:id="id5" draw:id="id5" draw:layer="layout" svg:width="0.5cm" svg:height="0.5cm" svg:x="10.192cm" svg:y="5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6" draw:text-style-name="P1" draw:layer="layout" svg:width="3.5cm" svg:height="2cm" svg:x="3.507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7" draw:text-style-name="P16" draw:layer="layout" svg:width="1.962cm" svg:height="1.5cm" svg:x="4.045cm" svg:y="2cm">
          <draw:text-box>
            <text:p text:style-name="P15"><text:span text:style-name="T7">INIT</text:span></text:p>
          </draw:text-box>
        </draw:frame>
        <draw:custom-shape draw:style-name="gr18" draw:text-style-name="P18" xml:id="id8" draw:id="id8" draw:layer="layout" svg:width="4.5cm" svg:height="2cm" svg:x="3.007cm" svg:y="10.673cm">
          <text:p text:style-name="P17"><text:span text:style-name="T7">ETAT </text:span></text:p>
          <text:p text:style-name="P17"><text:span text:style-name="T7">« ALLUME »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9" draw:id="id9" draw:layer="layout" svg:width="4cm" svg:height="2cm" svg:x="3.007cm" svg:y="6cm">
          <text:p text:style-name="P3"><text:span text:style-name="T7">ETAT </text:span></text:p>
          <text:p text:style-name="P3"><text:span text:style-name="T7">« ETEINT »</text:span></text:p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4.507cm" svg:height="1.673cm" svg:x="5cm" svg:y="3.5cm">
          <draw:text-box>
            <text:p><text:span text:style-name="T6">Pompe = OFF</text:span></text:p>
            <text:p><text:span text:style-name="T6">LED = OFF</text:span></text:p>
          </draw:text-box>
        </draw:frame>
        <draw:line draw:style-name="gr20" draw:text-style-name="P13" draw:layer="layout" svg:x1="5.007cm" svg:y1="3.5cm" svg:x2="5.007cm" svg:y2="6cm">
          <text:p/>
        </draw:line>
        <draw:connector draw:style-name="gr1" draw:text-style-name="P1" draw:layer="layout" draw:line-skew="0.999cm" svg:x1="7.507cm" svg:y1="11.673cm" svg:x2="7.007cm" svg:y2="7cm" draw:start-shape="id8" draw:start-glue-point="1" draw:end-shape="id9" draw:end-glue-point="1" svg:d="M7507 11673h1500v-4673h-2000" svg:viewBox="0 0 2001 4674">
          <text:p/>
        </draw:connector>
        <draw:connector draw:style-name="gr1" draw:text-style-name="P1" draw:layer="layout" draw:line-skew="-0.999cm" svg:x1="3.007cm" svg:y1="11.673cm" svg:x2="3.007cm" svg:y2="7cm" draw:start-shape="id8" draw:start-glue-point="3" draw:end-shape="id9" draw:end-glue-point="3" svg:d="M3007 11673h-1500v-4673h1500" svg:viewBox="0 0 1501 4674">
          <text:p/>
        </draw:connector>
        <draw:line draw:style-name="gr21" draw:text-style-name="P13" draw:layer="layout" svg:x1="8.507cm" svg:y1="11.673cm" svg:x2="7.507cm" svg:y2="11.673cm">
          <text:p/>
        </draw:line>
        <draw:frame draw:style-name="gr22" draw:text-style-name="P20" draw:layer="layout" svg:width="2cm" svg:height="1.5cm" svg:x="9.007cm" svg:y="8cm">
          <draw:text-box>
            <text:p text:style-name="P19"><text:span text:style-name="T8">BP1</text:span></text:p>
          </draw:text-box>
        </draw:frame>
        <draw:frame draw:style-name="gr23" draw:text-style-name="P20" draw:layer="layout" svg:width="2cm" svg:height="1cm" svg:x="1.507cm" svg:y="8cm">
          <draw:text-box>
            <text:p text:style-name="P19"><text:span text:style-name="T8">BP2</text:span></text:p>
          </draw:text-box>
        </draw:frame>
        <draw:custom-shape draw:style-name="gr16" draw:text-style-name="P1" draw:layer="layout" svg:width="3.5cm" svg:height="2cm" svg:x="3.507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7" draw:text-style-name="P16" draw:layer="layout" svg:width="1.962cm" svg:height="1.5cm" svg:x="4.045cm" svg:y="2cm">
          <draw:text-box>
            <text:p text:style-name="P15"><text:span text:style-name="T7">INIT</text:span></text:p>
          </draw:text-box>
        </draw:frame>
        <draw:custom-shape draw:style-name="gr18" draw:text-style-name="P18" xml:id="id10" draw:id="id10" draw:layer="layout" svg:width="4.5cm" svg:height="2cm" svg:x="3.007cm" svg:y="10.673cm">
          <text:p text:style-name="P17"><text:span text:style-name="T7">ETAT </text:span></text:p>
          <text:p text:style-name="P17"><text:span text:style-name="T7">« ALLUME »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1" draw:id="id11" draw:layer="layout" svg:width="4cm" svg:height="2cm" svg:x="3.007cm" svg:y="6cm">
          <text:p text:style-name="P3"><text:span text:style-name="T7">ETAT </text:span></text:p>
          <text:p text:style-name="P3"><text:span text:style-name="T7">« ETEINT »</text:span></text:p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4.507cm" svg:height="1.673cm" svg:x="1.5cm" svg:y="8.827cm">
          <draw:text-box>
            <text:p><text:span text:style-name="T6">Pompe = OFF</text:span></text:p>
            <text:p><text:span text:style-name="T6">LED = OFF</text:span></text:p>
          </draw:text-box>
        </draw:frame>
        <draw:line draw:style-name="gr20" draw:text-style-name="P13" draw:layer="layout" svg:x1="5.007cm" svg:y1="3.5cm" svg:x2="5.007cm" svg:y2="6cm">
          <text:p/>
        </draw:line>
        <draw:frame draw:style-name="gr13" draw:text-style-name="P12" draw:layer="layout" svg:width="4.19cm" svg:height="1.673cm" svg:x="9.007cm" svg:y="8.827cm">
          <draw:text-box>
            <text:p><text:span text:style-name="T6">Pompe = ON</text:span></text:p>
            <text:p><text:span text:style-name="T6">LED = ON</text:span></text:p>
          </draw:text-box>
        </draw:frame>
        <draw:connector draw:style-name="gr1" draw:text-style-name="P1" draw:layer="layout" draw:line-skew="0.999cm" svg:x1="7.507cm" svg:y1="11.673cm" svg:x2="7.007cm" svg:y2="7cm" draw:start-shape="id10" draw:start-glue-point="1" draw:end-shape="id11" draw:end-glue-point="1" svg:d="M7507 11673h1500v-4673h-2000" svg:viewBox="0 0 2001 4674">
          <text:p/>
        </draw:connector>
        <draw:connector draw:style-name="gr1" draw:text-style-name="P1" draw:layer="layout" draw:line-skew="-0.999cm" svg:x1="3.007cm" svg:y1="11.673cm" svg:x2="3.007cm" svg:y2="7cm" draw:start-shape="id10" draw:start-glue-point="3" draw:end-shape="id11" draw:end-glue-point="3" svg:d="M3007 11673h-1500v-4673h1500" svg:viewBox="0 0 1501 4674">
          <text:p/>
        </draw:connector>
        <draw:line draw:style-name="gr21" draw:text-style-name="P13" draw:layer="layout" svg:x1="8.507cm" svg:y1="11.673cm" svg:x2="7.507cm" svg:y2="11.673cm">
          <text:p/>
        </draw:line>
        <draw:custom-shape draw:style-name="gr16" draw:text-style-name="P1" draw:layer="layout" svg:width="3.5cm" svg:height="2cm" svg:x="17.128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7" draw:text-style-name="P16" draw:layer="layout" svg:width="1.962cm" svg:height="1.5cm" svg:x="17.666cm" svg:y="2cm">
          <draw:text-box>
            <text:p text:style-name="P15"><text:span text:style-name="T7">INIT</text:span></text:p>
          </draw:text-box>
        </draw:frame>
        <draw:custom-shape draw:style-name="gr18" draw:text-style-name="P18" xml:id="id12" draw:id="id12" draw:layer="layout" svg:width="4.5cm" svg:height="2cm" svg:x="16.628cm" svg:y="10.673cm">
          <text:p text:style-name="P17"><text:span text:style-name="T7">ETAT </text:span></text:p>
          <text:p text:style-name="P17"><text:span text:style-name="T7">« ALLUME »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3" draw:id="id13" draw:layer="layout" svg:width="4cm" svg:height="2cm" svg:x="16.628cm" svg:y="6cm">
          <text:p text:style-name="P3"><text:span text:style-name="T7">ETAT </text:span></text:p>
          <text:p text:style-name="P3"><text:span text:style-name="T7">« ETEINT »</text:span></text:p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4.189cm" svg:height="1.673cm" svg:x="18.628cm" svg:y="3.673cm">
          <draw:text-box>
            <text:p><text:span text:style-name="T6">Brum. = OFF</text:span></text:p>
            <text:p><text:span text:style-name="T6">LED = OFF</text:span></text:p>
          </draw:text-box>
        </draw:frame>
        <draw:frame draw:style-name="gr13" draw:text-style-name="P12" draw:layer="layout" svg:width="4.189cm" svg:height="1.673cm" svg:x="15.128cm" svg:y="8.673cm">
          <draw:text-box>
            <text:p><text:span text:style-name="T6">Brum. = OFF</text:span></text:p>
            <text:p><text:span text:style-name="T6">LED = OFF</text:span></text:p>
          </draw:text-box>
        </draw:frame>
        <draw:line draw:style-name="gr20" draw:text-style-name="P13" draw:layer="layout" svg:x1="18.628cm" svg:y1="3.5cm" svg:x2="18.628cm" svg:y2="6cm">
          <text:p/>
        </draw:line>
        <draw:frame draw:style-name="gr13" draw:text-style-name="P12" draw:layer="layout" svg:width="3.872cm" svg:height="1.673cm" svg:x="22.628cm" svg:y="8.673cm">
          <draw:text-box>
            <text:p><text:span text:style-name="T6">Brum. = ON</text:span></text:p>
            <text:p><text:span text:style-name="T6">LED = ON</text:span></text:p>
          </draw:text-box>
        </draw:frame>
        <draw:connector draw:style-name="gr1" draw:text-style-name="P1" draw:layer="layout" draw:line-skew="0.999cm" svg:x1="21.128cm" svg:y1="11.673cm" svg:x2="20.628cm" svg:y2="7cm" draw:start-shape="id12" draw:start-glue-point="1" draw:end-shape="id13" draw:end-glue-point="1" svg:d="M21128 11673h1500v-4673h-2000" svg:viewBox="0 0 2001 4674">
          <text:p/>
        </draw:connector>
        <draw:connector draw:style-name="gr1" draw:text-style-name="P1" draw:layer="layout" draw:line-skew="-0.999cm" svg:x1="16.628cm" svg:y1="11.673cm" svg:x2="16.628cm" svg:y2="7cm" draw:start-shape="id12" draw:start-glue-point="3" draw:end-shape="id13" draw:end-glue-point="3" svg:d="M16628 11673h-1500v-4673h1500" svg:viewBox="0 0 1501 4674">
          <text:p/>
        </draw:connector>
        <draw:line draw:style-name="gr21" draw:text-style-name="P13" draw:layer="layout" svg:x1="22.128cm" svg:y1="11.673cm" svg:x2="21.128cm" svg:y2="11.673cm">
          <text:p/>
        </draw:line>
        <draw:frame draw:style-name="gr24" draw:text-style-name="P20" draw:layer="layout" svg:width="2cm" svg:height="1.654cm" svg:x="22.628cm" svg:y="7.846cm">
          <draw:text-box>
            <text:p text:style-name="P19"><text:span text:style-name="T8">BP3</text:span></text:p>
          </draw:text-box>
        </draw:frame>
        <draw:frame draw:style-name="gr23" draw:text-style-name="P20" draw:layer="layout" svg:width="2cm" svg:height="1cm" svg:x="15.128cm" svg:y="8cm">
          <draw:text-box>
            <text:p text:style-name="P19"><text:span text:style-name="T8">BP4</text:span></text:p>
          </draw:text-box>
        </draw:frame>
        <draw:frame draw:style-name="gr13" draw:text-style-name="P22" draw:layer="layout" svg:width="12.313cm" svg:height="1.673cm" svg:x="0.5cm" svg:y="0.327cm">
          <draw:text-box>
            <text:p text:style-name="P21"><text:span text:style-name="T9">Test du relais / pompe avec BP1 et BP2</text:span></text:p>
          </draw:text-box>
        </draw:frame>
        <draw:frame draw:style-name="gr13" draw:text-style-name="P22" draw:layer="layout" svg:width="13.901cm" svg:height="1.673cm" svg:x="13.5cm" svg:y="0.327cm">
          <draw:text-box>
            <text:p text:style-name="P21"><text:span text:style-name="T9">Test du relais / brumisateur avec BP3 et BP4</text:span></text:p>
          </draw:text-box>
        </draw:frame>
        <draw:line draw:style-name="gr21" draw:text-style-name="P13" draw:layer="layout" svg:x1="1.507cm" svg:y1="7cm" svg:x2="3.007cm" svg:y2="7cm">
          <text:p/>
        </draw:line>
        <draw:line draw:style-name="gr21" draw:text-style-name="P13" draw:layer="layout" svg:x1="15.128cm" svg:y1="7cm" svg:x2="16.628cm" svg:y2="7cm">
          <text:p/>
        </draw:line>
        <presentation:notes draw:style-name="dp1">
          <draw:page-thumbnail draw:style-name="gr15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6" draw:text-style-name="P1" draw:layer="layout" svg:width="3.5cm" svg:height="2cm" svg:x="9.5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7" draw:text-style-name="P16" draw:layer="layout" svg:width="1.962cm" svg:height="1.5cm" svg:x="10.038cm" svg:y="2cm">
          <draw:text-box>
            <text:p text:style-name="P15"><text:span text:style-name="T7">INIT</text:span></text:p>
          </draw:text-box>
        </draw:frame>
        <draw:custom-shape draw:style-name="gr18" draw:text-style-name="P18" xml:id="id16" draw:id="id16" draw:layer="layout" svg:width="4.5cm" svg:height="2cm" svg:x="1.5cm" svg:y="11cm">
          <text:p text:style-name="P17"><text:span text:style-name="T7">Vent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15" draw:id="id15" draw:layer="layout" svg:width="4cm" svg:height="2cm" svg:x="9cm" svg:y="6cm">
          <text:p text:style-name="P23"><text:span text:style-name="T10">En </text:span></text:p>
          <text:p text:style-name="P23"><text:span text:style-name="T10">Attente</text:span></text:p>
          <draw:enhanced-geometry svg:viewBox="0 0 21600 21600" draw:type="rectangle" draw:enhanced-path="M 0 0 L 21600 0 21600 21600 0 21600 0 0 Z N"/>
        </draw:custom-shape>
        <draw:line draw:style-name="gr20" draw:text-style-name="P13" draw:layer="layout" svg:x1="11cm" svg:y1="3.5cm" svg:x2="11cm" svg:y2="6cm">
          <text:p/>
        </draw:line>
        <draw:connector draw:style-name="gr1" draw:text-style-name="P1" draw:layer="layout" svg:x1="20.25cm" svg:y1="11cm" svg:x2="13cm" svg:y2="7cm" draw:start-shape="id14" draw:start-glue-point="0" draw:end-shape="id15" draw:end-glue-point="1" svg:d="M20250 11000v-4000h-7250" svg:viewBox="0 0 7251 4001">
          <text:p/>
        </draw:connector>
        <draw:connector draw:style-name="gr1" draw:text-style-name="P1" draw:layer="layout" svg:x1="3.75cm" svg:y1="11cm" svg:x2="9cm" svg:y2="7cm" draw:start-shape="id16" draw:start-glue-point="0" draw:end-shape="id15" draw:end-glue-point="3" svg:d="M3750 11000v-4000h5250" svg:viewBox="0 0 5251 4001">
          <text:p/>
        </draw:connector>
        <draw:line draw:style-name="gr21" draw:text-style-name="P13" draw:layer="layout" svg:x1="20.25cm" svg:y1="10cm" svg:x2="20.25cm" svg:y2="11cm">
          <text:p/>
        </draw:line>
        <draw:frame draw:style-name="gr23" draw:text-style-name="P20" draw:layer="layout" svg:width="4.084cm" svg:height="1cm" svg:x="13cm" svg:y="6cm">
          <draw:text-box>
            <text:p text:style-name="P19"><text:span text:style-name="T8">Hum &lt; 30 %</text:span></text:p>
          </draw:text-box>
        </draw:frame>
        <draw:frame draw:style-name="gr13" draw:text-style-name="P22" draw:layer="layout" svg:width="21.71cm" svg:height="1.673cm" svg:x="2.5cm" svg:y="0.327cm">
          <draw:text-box>
            <text:p text:style-name="P21"><text:span text:style-name="T9">Boucle de régulation « Humidité » avec le ventilateur et le brumisateur</text:span></text:p>
          </draw:text-box>
        </draw:frame>
        <draw:custom-shape draw:style-name="gr18" draw:text-style-name="P18" xml:id="id14" draw:id="id14" draw:layer="layout" svg:width="4.5cm" svg:height="2cm" svg:x="18cm" svg:y="11cm">
          <text:p text:style-name="P17"><text:span text:style-name="T7">Humidifier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4.189cm" svg:height="1.673cm" svg:x="11.311cm" svg:y="4cm">
          <draw:text-box>
            <text:p><text:span text:style-name="T6">Brum. = OFF</text:span></text:p>
            <text:p><text:span text:style-name="T6">Vent. = OFF</text:span></text:p>
          </draw:text-box>
        </draw:frame>
        <draw:frame draw:style-name="gr13" draw:text-style-name="P12" draw:layer="layout" svg:width="3.943cm" svg:height="1.673cm" svg:x="16.307cm" svg:y="7.827cm">
          <draw:text-box>
            <text:p><text:span text:style-name="T6">Brum. = ON</text:span></text:p>
            <text:p><text:span text:style-name="T6">Vent. = OFF</text:span></text:p>
          </draw:text-box>
        </draw:frame>
        <draw:frame draw:style-name="gr13" draw:text-style-name="P12" draw:layer="layout" svg:width="4.189cm" svg:height="1.673cm" svg:x="3.75cm" svg:y="7.816cm">
          <draw:text-box>
            <text:p><text:span text:style-name="T6">Brum. = OFF</text:span></text:p>
            <text:p><text:span text:style-name="T6">Vent. = ON</text:span></text:p>
          </draw:text-box>
        </draw:frame>
        <draw:frame draw:style-name="gr23" draw:text-style-name="P20" draw:layer="layout" svg:width="4.084cm" svg:height="1cm" svg:x="4.916cm" svg:y="6cm">
          <draw:text-box>
            <text:p text:style-name="P19"><text:span text:style-name="T8">Hum &gt; 80 %</text:span></text:p>
          </draw:text-box>
        </draw:frame>
        <draw:line draw:style-name="gr21" draw:text-style-name="P13" draw:layer="layout" svg:x1="3.75cm" svg:y1="10cm" svg:x2="3.75cm" svg:y2="11cm">
          <text:p/>
        </draw:line>
        <draw:connector draw:style-name="gr1" draw:text-style-name="P1" draw:layer="layout" svg:x1="6cm" svg:y1="12cm" svg:x2="11cm" svg:y2="8cm" draw:start-shape="id16" draw:start-glue-point="1" draw:end-shape="id15" draw:end-glue-point="2" svg:d="M6000 12000h5000v-4000" svg:viewBox="0 0 5001 4001">
          <text:p/>
        </draw:connector>
        <draw:line draw:style-name="gr21" draw:text-style-name="P13" draw:layer="layout" svg:x1="11cm" svg:y1="9cm" svg:x2="11cm" svg:y2="8cm">
          <text:p/>
        </draw:line>
        <draw:frame draw:style-name="gr23" draw:text-style-name="P20" draw:layer="layout" svg:width="4.084cm" svg:height="1cm" svg:x="6cm" svg:y="11cm">
          <draw:text-box>
            <text:p text:style-name="P19"><text:span text:style-name="T8">Hum &lt; 80 %</text:span></text:p>
          </draw:text-box>
        </draw:frame>
        <draw:frame draw:style-name="gr13" draw:text-style-name="P12" draw:layer="layout" svg:width="3.943cm" svg:height="1.673cm" svg:x="6.057cm" svg:y="12cm">
          <draw:text-box>
            <text:p><text:span text:style-name="T6">Vent. = OFF</text:span></text:p>
          </draw:text-box>
        </draw:frame>
        <draw:line draw:style-name="gr21" draw:text-style-name="P13" draw:layer="layout" svg:x1="11.5cm" svg:y1="12cm" svg:x2="11.5cm" svg:y2="8cm">
          <text:p/>
        </draw:line>
        <draw:line draw:style-name="gr25" draw:text-style-name="P13" draw:layer="layout" svg:x1="11.5cm" svg:y1="12cm" svg:x2="18cm" svg:y2="12cm">
          <text:p/>
        </draw:line>
        <draw:frame draw:style-name="gr23" draw:text-style-name="P20" draw:layer="layout" svg:width="4.084cm" svg:height="1cm" svg:x="13.916cm" svg:y="11cm">
          <draw:text-box>
            <text:p text:style-name="P19"><text:span text:style-name="T8">Hum &gt; 30 %</text:span></text:p>
          </draw:text-box>
        </draw:frame>
        <draw:frame draw:style-name="gr13" draw:text-style-name="P12" draw:layer="layout" svg:width="4.189cm" svg:height="1.673cm" svg:x="13.5cm" svg:y="12cm">
          <draw:text-box>
            <text:p><text:span text:style-name="T6">Brum. = OFF</text:span></text:p>
          </draw:text-box>
        </draw:frame>
        <presentation:notes draw:style-name="dp1">
          <draw:page-thumbnail draw:style-name="gr15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2T13:10:10.473042100</meta:creation-date>
    <dc:date>2026-05-19T19:30:00.677213300</dc:date>
    <meta:editing-duration>PT31M53S</meta:editing-duration>
    <meta:editing-cycles>4</meta:editing-cycles>
    <meta:generator>LibreOffice/25.8.5.2$Windows_X86_64 LibreOffice_project/9c8b85f387cc00a89945a79c9e6239f32e450ac2</meta:generator>
    <meta:document-statistic meta:object-count="114"/>
  </office:meta>
</office:document-meta>
</file>